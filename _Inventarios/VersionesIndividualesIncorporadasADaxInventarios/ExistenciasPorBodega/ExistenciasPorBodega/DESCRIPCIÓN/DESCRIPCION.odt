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uestra las existencias de cada producto en cada bodega existente en la empresa, y los totales de cada bodega y totales por categoría de productos, también en la ultima columna muestra el total de existencias en todas las bodegas de cada produc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STEMAS1</meta:initial-creator>
    <dc:creator>SISTEMAS1</dc:creator>
    <meta:creation-date>2012-04-27T18:15:00Z</meta:creation-date>
    <dc:date>2012-04-27T18:18:00Z</dc:date>
    <meta:template xlink:href="Normal" xlink:type="simple"/>
    <meta:editing-cycles>1</meta:editing-cycles>
    <meta:editing-duration>PT180S</meta:editing-duration>
    <meta:document-statistic meta:page-count="1" meta:paragraph-count="1" meta:word-count="38" meta:character-count="246" meta:row-count="1" meta:non-whitespace-character-count="209"/>
  </office:meta>
</office:document-meta>
</file>