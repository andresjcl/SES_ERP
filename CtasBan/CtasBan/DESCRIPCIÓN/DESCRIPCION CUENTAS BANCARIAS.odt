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NGRESAS NUEVAS CUENTAS CUANDO DAMOS CLIC EN NUEVO</text:p>
      <text:p text:style-name="Normal">ABRE LAS CUENTAS CREADAS PARA MODIFICARLAS O ELIMINARLAS</text:p>
      <text:p text:style-name="Normal">IMPRIMIR NOS DEVUELVE EL REPORTE DE LAS CUENTAS CREADAS</text:p>
      <text:p text:style-name="Normal">A LADO DE LA CAJA DE<text:s/>TEXTO<text:s/>CUENTAS HAY UN BUSCADOR EL CUAL PODEMOS USAR SI NO NOS ACORDAMOS DEL CODIGO DE LAS CUENTAS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ISTEMAS1</meta:initial-creator>
    <dc:creator>SISTEMAS1</dc:creator>
    <meta:creation-date>2012-04-19T18:18:00Z</meta:creation-date>
    <dc:date>2012-04-23T12:53:00Z</dc:date>
    <meta:template xlink:href="Normal" xlink:type="simple"/>
    <meta:editing-cycles>2</meta:editing-cycles>
    <meta:editing-duration>PT300S</meta:editing-duration>
    <meta:document-statistic meta:page-count="1" meta:paragraph-count="1" meta:word-count="43" meta:character-count="283" meta:row-count="2" meta:non-whitespace-character-count="241"/>
  </office:meta>
</office:document-meta>
</file>